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9659" officeooo:paragraph-rsid="001b9659"/>
    </style:style>
    <style:style style:name="P2" style:family="paragraph" style:parent-style-name="Standard">
      <style:text-properties officeooo:rsid="001b9659" officeooo:paragraph-rsid="001c5ff1"/>
    </style:style>
    <style:style style:name="P3" style:family="paragraph" style:parent-style-name="Standard">
      <style:text-properties officeooo:rsid="001b9659" officeooo:paragraph-rsid="001d466d"/>
    </style:style>
    <style:style style:name="P4" style:family="paragraph" style:parent-style-name="Standard">
      <style:text-properties officeooo:rsid="001d466d" officeooo:paragraph-rsid="001d466d"/>
    </style:style>
    <style:style style:name="T1" style:family="text">
      <style:text-properties officeooo:rsid="001c5ff1"/>
    </style:style>
    <style:style style:name="T2" style:family="text">
      <style:text-properties officeooo:rsid="001d46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Kashminds bitbucket login :<text:line-break/><text:line-break/>user name : remittanceproject1@gmail.com</text:p>
      <text:p text:style-name="P1">password : <text:s/><text:a xlink:type="simple" xlink:href="mailto:Remittance@123" text:style-name="Internet_20_link" text:visited-style-name="Visited_20_Internet_20_Link">Remittance@123</text:a><text:line-break/></text:p>
      <text:p text:style-name="P1"><text:line-break/>kashminds mobile app git link :<text:line-break/><text:line-break/>Git Link : git clone https://remittanceproject1@bitbucket.org/onswin-fintech/kashminds_mobileapp.git<text:line-break/>Password : ATBBvnLhCLewpd43w6ncbnVQ7ETu39D171E5</text:p>
      <text:p text:style-name="P1"/>
      <text:p text:style-name="P1"/>
      <text:p text:style-name="P3">Web / Mobile Login for Kashminds :</text:p>
      <text:p text:style-name="P3"/>
      <text:p text:style-name="P3"><text:span text:style-name="T2">Link : https://dev.kashremit.com</text:span><text:line-break/><text:line-break/>Username : <text:a xlink:type="simple" xlink:href="mailto:nateshkumar1406@gmail.com" text:style-name="Internet_20_link" text:visited-style-name="Visited_20_Internet_20_Link">nateshkumar1406@gmail.com</text:a><text:line-break/>Password : <text:a xlink:type="simple" xlink:href="mailto:Test@123" text:style-name="Internet_20_link" text:visited-style-name="Visited_20_Internet_20_Link">Test@123</text:a></text:p>
      <text:p text:style-name="P1"/>
      <text:p text:style-name="P2">Username : <text:span text:style-name="T1">raj</text:span><text:a xlink:type="simple" xlink:href="mailto:nateshkumar1406@gmail.com" text:style-name="Internet_20_link" text:visited-style-name="Visited_20_Internet_20_Link">@gmail.com</text:a><text:line-break/>Password : <text:a xlink:type="simple" xlink:href="mailto:Test@123" text:style-name="Internet_20_link" text:visited-style-name="Visited_20_Internet_20_Link">Test@123</text:a><text:line-break/><text:line-break/>Username : <text:span text:style-name="T2">srshervan@gmail.com</text:span><text:line-break/>Password : <text:a xlink:type="simple" xlink:href="mailto:Test@123" text:style-name="Internet_20_link" text:visited-style-name="Visited_20_Internet_20_Link">Test@123</text:a></text:p>
      <text:p text:style-name="P2"/>
      <text:p text:style-name="P2"/>
      <text:p text:style-name="P3">Username : <text:span text:style-name="T2">CSru</text:span>b<text:span text:style-name="T2">ymar30@gmail.com</text:span><text:line-break/>Password : <text:a xlink:type="simple" xlink:href="mailto:Ruby@123" text:style-name="Internet_20_link" text:visited-style-name="Visited_20_Internet_20_Link"><text:span text:style-name="T2">Ru</text:span></text:a><text:a xlink:type="simple" xlink:href="mailto:Ruby@123" text:style-name="Internet_20_link" text:visited-style-name="Visited_20_Internet_20_Link">b</text:a><text:a xlink:type="simple" xlink:href="mailto:Ruby@123" text:style-name="Internet_20_link" text:visited-style-name="Visited_20_Internet_20_Link"><text:span text:style-name="T2">y@123</text:span></text:a></text:p>
      <text:p text:style-name="P3"/>
      <text:p text:style-name="P3"/>
      <text:p text:style-name="P3"/>
      <text:p text:style-name="P4">Plesk Login Details:<text:line-break/></text:p>
      <text:p text:style-name="P4">URL: https://198.38.83.60:8443/</text:p>
      <text:p text:style-name="P4">Username: administrator</text:p>
      <text:p text:style-name="P4">Password: 1HHmnXuqaiYoSwo$<text:line-break/></text:p>
      <text:p text:style-name="P3"><text:span text:style-name="T2"><text:line-break/><text:line-break/>CRM Login:<text:line-break/><text:line-break/>Link : </text:span><text:a xlink:type="simple" xlink:href="https://orm.kashremit.com/Login/Login.aspx" text:style-name="Internet_20_link" text:visited-style-name="Visited_20_Internet_20_Link"><text:span text:style-name="T2">https://orm.kashremit.com/Login/Login.aspx</text:span></text:a></text:p>
      <text:p text:style-name="P3">User:CRM1 <text:s/></text:p>
      <text:p text:style-name="P3">pass:Test@123</text:p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11:52:00.092354233</meta:creation-date>
    <dc:date>2025-11-05T12:22:44.189172060</dc:date>
    <meta:editing-duration>PT3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76" meta:character-count="739" meta:non-whitespace-character-count="663"/>
  </office:meta>
</office:document-meta>
</file>